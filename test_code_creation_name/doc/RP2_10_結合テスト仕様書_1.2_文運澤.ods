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7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1.199cm" fo:break-before="auto" style:use-optimal-row-height="true"/>
    </style:style>
    <style:style style:name="ro23" style:family="table-row">
      <style:table-row-properties style:row-height="0.847cm" fo:break-before="auto" style:use-optimal-row-height="true"/>
    </style:style>
    <style:style style:name="ro24" style:family="table-row">
      <style:table-row-properties style:row-height="1.094cm" fo:break-before="auto" style:use-optimal-row-height="true"/>
    </style:style>
    <style:style style:name="ro25" style:family="table-row">
      <style:table-row-properties style:row-height="2.258cm" fo:break-before="auto" style:use-optimal-row-height="true"/>
    </style:style>
    <style:style style:name="ro26" style:family="table-row">
      <style:table-row-properties style:row-height="0.51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7" style:family="text">
      <style:text-properties fo:color="#0000ff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0pt" style:font-size-complex="10pt" style:font-weight-asian="normal" style:font-weight-complex="normal" style:font-style-asian="normal" style:font-style-complex="normal"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/>
    </style:style>
    <style:style style:name="T9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 style:font-name="ＭＳ ゴシック" style:font-name-asian="ＭＳ ゴシック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253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253"/>
        </table:table-row>
        <table:table-row table:style-name="ro7" table:number-rows-repeated="3">
          <table:table-cell/>
          <table:table-cell table:style-name="ce120"/>
          <table:table-cell table:style-name="ce128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253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http://localhost:8080/lms </text:span><text:span text:style-name="T6">にアクセスし、ログイン画面であることを確認</text:span></text:p>
          </table:table-cell>
          <table:covered-table-cell table:number-columns-repeated="22" table:style-name="ce66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18" calcext:value-type="date" table:number-columns-spanned="5" table:number-rows-spanned="1">
            <text:p>2026/6/18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BB00 </text:p>
            <text:p>Password：StudentBB00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ログインに失敗しました」というエラーメッセージが表示される</text:p>
          </table:table-cell>
          <table:covered-table-cell table:number-columns-repeated="26" table:style-name="ce144"/>
          <table:table-cell table:style-name="ce7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2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5" table:number-columns-spanned="23" table:number-rows-spanned="1"/>
          <table:covered-table-cell table:number-columns-repeated="22" table:style-name="ce75"/>
          <table:table-cell table:style-name="ce144" table:number-columns-spanned="27" table:number-rows-spanned="1"/>
          <table:covered-table-cell table:number-columns-repeated="26" table:style-name="ce144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キーワード検索欄に「キャンセル」を入力し、検索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画面下部に「キャンセル」を含む検索結果だけを表示される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クリア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入力したキーワードが消去される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4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67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画面上部メニューの「ヘルプ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3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カテゴリー検索ボタンを押下し、「【研修関係】」を選択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画面下部に「キャンセル料・途中退校について」と「研修の申し込みはどのようにすれば良いですか？」だけ、【研修関係】に関する検索結果２つを表示される。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5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検索結果の質問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【研修関係】に関する質問の回答が展開し、。具体的な回答内容は「営業担当がいる場合は、営業担当までご連絡ください。申し込み方法についてご案内させていただきます。なお、弊社営業営業がいない場合は、東京ITスクール運営事務局までご連絡いただけると幸いです。」及び「受講者の退職や解雇等、やむを得ない事情による途中終了に関してなど、事情をお伺いした上で、協議という形を取らせて頂きます。弊社営業担当までご相談下さい。」と表示される。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未提出」のコース（Java概要）を選択し、「詳細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Java概要」セクション画面に遷移</text:p>
          </table:table-cell>
          <table:covered-table-cell table:number-columns-repeated="26" table:style-name="ce144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日報【デモ】を提出する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144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6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<text:span text:style-name="T8">入力欄に「</text:span><text:span text:style-name="T9">test</text:span><text:span text:style-name="T6">」という内容を入力し、「日報を提出する」ボタンを押下</text:span></text:p>
          </table:table-cell>
          <table:covered-table-cell table:number-columns-repeated="22" table:style-name="ce76"/>
          <table:table-cell table:style-name="ce144" office:value-type="string" calcext:value-type="string" table:number-columns-spanned="27" table:number-rows-spanned="1">
            <text:p>入力欄に「test」が表示され、セクション画面にもどる</text:p>
          </table:table-cell>
          <table:covered-table-cell table:number-columns-repeated="26" table:style-name="ce144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提出済み」のコース（ハードウェア、ソフトウェア、WWW）を選択し、「詳細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ハードウェア、ソフトウェア、WWW」セクション画面に遷移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提出済み日報【デモ】を確認する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5" table:number-columns-spanned="23" table:number-rows-spanned="1"/>
          <table:covered-table-cell table:number-columns-repeated="22" table:style-name="ce75"/>
          <table:table-cell table:style-name="ce144" table:number-columns-spanned="27" table:number-rows-spanned="1"/>
          <table:covered-table-cell table:number-columns-repeated="26" table:style-name="ce144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table:number-columns-spanned="23" table:number-rows-spanned="1"/>
          <table:covered-table-cell table:number-columns-repeated="22" table:style-name="ce144"/>
          <table:table-cell table:style-name="ce144" table:number-columns-spanned="27" table:number-rows-spanned="1"/>
          <table:covered-table-cell table:number-columns-repeated="26" table:style-name="ce144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7" table:number-columns-spanned="5" table:number-rows-spanned="1"/>
          <table:covered-table-cell table:number-columns-repeated="4" table:style-name="ce77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7" table:number-columns-spanned="5" table:number-rows-spanned="1"/>
          <table:covered-table-cell table:number-columns-repeated="4" table:style-name="ce77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7" table:number-columns-spanned="5" table:number-rows-spanned="1"/>
          <table:covered-table-cell table:number-columns-repeated="4" table:style-name="ce77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6:54:51.807180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7:22:38.342935200</dc:date>
    <meta:print-date>2025-02-21T15:24:43</meta:print-date>
    <meta:editing-duration>PT12H11M42S</meta:editing-duration>
    <meta:editing-cycles>52</meta:editing-cycles>
    <meta:generator>LibreOffice/26.2.4.2$Windows_X86_64 LibreOffice_project/0229ac93fcf0d7cbc6376066c6f35021cef002dc</meta:generator>
    <meta:document-statistic meta:table-count="19" meta:cell-count="556" meta:object-count="0"/>
  </office:meta>
</office:document-meta>
</file>